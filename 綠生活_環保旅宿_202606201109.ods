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I DO民宿</text:p>
          </table:table-cell>
          <table:table-cell office:value-type="string">
            <text:p>宜蘭縣</text:p>
          </table:table-cell>
          <table:table-cell office:value-type="string">
            <text:p>宜蘭縣五結鄉福和二路118巷2號</text:p>
          </table:table-cell>
          <table:table-cell office:value-type="string">
            <text:p>(-)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慕民宿</text:p>
          </table:table-cell>
          <table:table-cell office:value-type="string">
            <text:p>南投縣</text:p>
          </table:table-cell>
          <table:table-cell office:value-type="string">
            <text:p>南投縣魚池鄉水社村中山路216號</text:p>
          </table:table-cell>
          <table:table-cell office:value-type="string">
            <text:p>(0925)9716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西湖渡假大飯店</text:p>
          </table:table-cell>
          <table:table-cell office:value-type="string">
            <text:p>苗栗縣</text:p>
          </table:table-cell>
          <table:table-cell office:value-type="string">
            <text:p>苗栗縣三義鄉西湖村西湖11號</text:p>
          </table:table-cell>
          <table:table-cell office:value-type="string">
            <text:p>(037)876699#112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貳十二度行旅</text:p>
          </table:table-cell>
          <table:table-cell office:value-type="string">
            <text:p>宜蘭縣</text:p>
          </table:table-cell>
          <table:table-cell office:value-type="string">
            <text:p>宜蘭縣蘇澳鎮信義路177號</text:p>
          </table:table-cell>
          <table:table-cell office:value-type="string">
            <text:p>(03)9901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台南館<text:s/></text:p>
          </table:table-cell>
          <table:table-cell office:value-type="string">
            <text:p>臺南市</text:p>
          </table:table-cell>
          <table:table-cell office:value-type="string">
            <text:p>臺南市中西區永福路1段269號1-12樓及地下一層至三層</text:p>
          </table:table-cell>
          <table:table-cell office:value-type="string">
            <text:p>(06)2156000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福容voco酒店</text:p>
          </table:table-cell>
          <table:table-cell office:value-type="string">
            <text:p>嘉義市</text:p>
          </table:table-cell>
          <table:table-cell office:value-type="string">
            <text:p>嘉義市西區世賢路一段789號B4-4樓、7樓、16樓-32樓</text:p>
          </table:table-cell>
          <table:table-cell office:value-type="string">
            <text:p>(05)2323389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