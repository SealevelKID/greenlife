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豐邑慕奇夕酒店</text:p>
          </table:table-cell>
          <table:table-cell office:value-type="string">
            <text:p>臺中市</text:p>
          </table:table-cell>
          <table:table-cell office:value-type="string">
            <text:p>臺中市西屯區文心南六路288號、288號2樓、288號3樓(地上物3至17樓)</text:p>
          </table:table-cell>
          <table:table-cell office:value-type="string">
            <text:p>(04)36007009#7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都麗緻大飯店</text:p>
          </table:table-cell>
          <table:table-cell office:value-type="string">
            <text:p>臺北市</text:p>
          </table:table-cell>
          <table:table-cell office:value-type="string">
            <text:p>臺北市中山區民權東路2段41號</text:p>
          </table:table-cell>
          <table:table-cell office:value-type="string">
            <text:p>02773523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億酒店股份有限公司</text:p>
          </table:table-cell>
          <table:table-cell office:value-type="string">
            <text:p>高雄市</text:p>
          </table:table-cell>
          <table:table-cell office:value-type="string">
            <text:p>高雄市前鎮區林森四路189號</text:p>
          </table:table-cell>
          <table:table-cell office:value-type="string">
            <text:p>07333399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宜蘭館</text:p>
          </table:table-cell>
          <table:table-cell office:value-type="string">
            <text:p>宜蘭縣</text:p>
          </table:table-cell>
          <table:table-cell office:value-type="string">
            <text:p>宜蘭縣宜蘭市凱旋路135號 、135號2至9樓</text:p>
          </table:table-cell>
          <table:table-cell office:value-type="string">
            <text:p>(09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禧榕軒大飯店</text:p>
          </table:table-cell>
          <table:table-cell office:value-type="string">
            <text:p>臺南市</text:p>
          </table:table-cell>
          <table:table-cell office:value-type="string">
            <text:p>臺南市北區成功路28號</text:p>
          </table:table-cell>
          <table:table-cell office:value-type="string">
            <text:p>(06)2222788#2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