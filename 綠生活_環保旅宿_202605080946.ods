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Table Export" table:style-name="ta1">
        <table:table-row>
          <table:table-cell office:value-type="string">
            <text:p>旅店性質</text:p>
          </table:table-cell>
          <table:table-cell office:value-type="string">
            <text:p>旅店名稱</text:p>
          </table:table-cell>
          <table:table-cell office:value-type="string">
            <text:p>縣市別</text:p>
          </table:table-cell>
          <table:table-cell office:value-type="string">
            <text:p>旅店地址</text:p>
          </table:table-cell>
          <table:table-cell office:value-type="string">
            <text:p>旅店電話</text:p>
          </table:table-cell>
          <table:table-cell office:value-type="string">
            <text:p>環保作為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HOFI VILLA和風飯店</text:p>
          </table:table-cell>
          <table:table-cell office:value-type="string">
            <text:p>宜蘭縣</text:p>
          </table:table-cell>
          <table:table-cell office:value-type="string">
            <text:p>宜蘭縣頭城鎮宜三路一段56號</text:p>
          </table:table-cell>
          <table:table-cell office:value-type="string">
            <text:p>(03)97777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J.S 23</text:p>
          </table:table-cell>
          <table:table-cell office:value-type="string">
            <text:p>高雄市</text:p>
          </table:table-cell>
          <table:table-cell office:value-type="string">
            <text:p>高雄市楠梓區新昌街10巷15弄23號</text:p>
          </table:table-cell>
          <table:table-cell office:value-type="string">
            <text:p>098530953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KMQM</text:p>
          </table:table-cell>
          <table:table-cell office:value-type="string">
            <text:p>金門縣</text:p>
          </table:table-cell>
          <table:table-cell office:value-type="string">
            <text:p>金門縣金寧鄉盤山村下堡28之1號</text:p>
          </table:table-cell>
          <table:table-cell office:value-type="string">
            <text:p>(0912)30448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SOHO工房眷村生活體驗館 <text:tab/></text:p>
          </table:table-cell>
          <table:table-cell office:value-type="string">
            <text:p>高雄市</text:p>
          </table:table-cell>
          <table:table-cell office:value-type="string">
            <text:p>高雄市鳳山區黃埔新村東三巷101號</text:p>
          </table:table-cell>
          <table:table-cell office:value-type="string">
            <text:p>(0906)50610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九昱晴美</text:p>
          </table:table-cell>
          <table:table-cell office:value-type="string">
            <text:p>臺北市</text:p>
          </table:table-cell>
          <table:table-cell office:value-type="string">
            <text:p>臺北市中山區林森北路568號2樓至13樓，3樓之1、2、3、5、6至12樓之1、2、3、5、6，13樓之1</text:p>
          </table:table-cell>
          <table:table-cell office:value-type="string">
            <text:p>(02)66080807#10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八里福朋喜來登酒店</text:p>
          </table:table-cell>
          <table:table-cell office:value-type="string">
            <text:p>新北市</text:p>
          </table:table-cell>
          <table:table-cell office:value-type="string">
            <text:p>新北市八里區觀海大道8號</text:p>
          </table:table-cell>
          <table:table-cell office:value-type="string">
            <text:p>(02)26192777#26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三好國際酒店</text:p>
          </table:table-cell>
          <table:table-cell office:value-type="string">
            <text:p>雲林縣</text:p>
          </table:table-cell>
          <table:table-cell office:value-type="string">
            <text:p>雲林縣斗六市斗六五路35號</text:p>
          </table:table-cell>
          <table:table-cell office:value-type="string">
            <text:p>(05)5510999#15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三道門建築文創旅店</text:p>
          </table:table-cell>
          <table:table-cell office:value-type="string">
            <text:p>臺南市</text:p>
          </table:table-cell>
          <table:table-cell office:value-type="string">
            <text:p>臺南市中西區成功路75、77號</text:p>
          </table:table-cell>
          <table:table-cell office:value-type="string">
            <text:p>(3088)22230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大地酒店</text:p>
          </table:table-cell>
          <table:table-cell office:value-type="string">
            <text:p>臺北市</text:p>
          </table:table-cell>
          <table:table-cell office:value-type="string">
            <text:p>臺北市北投區奇岩路1號</text:p>
          </table:table-cell>
          <table:table-cell office:value-type="string">
            <text:p>(02)28931221#100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大溪老城四季行館</text:p>
          </table:table-cell>
          <table:table-cell office:value-type="string">
            <text:p>桃園市</text:p>
          </table:table-cell>
          <table:table-cell office:value-type="string">
            <text:p>桃園市大溪區中央路37號</text:p>
          </table:table-cell>
          <table:table-cell office:value-type="string">
            <text:p>(03)388181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古堡民宿</text:p>
          </table:table-cell>
          <table:table-cell office:value-type="string">
            <text:p>臺東縣</text:p>
          </table:table-cell>
          <table:table-cell office:value-type="string">
            <text:p>臺東縣台東市興安路一段165號</text:p>
          </table:table-cell>
          <table:table-cell office:value-type="string">
            <text:p>(0910)63394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叮噹科學遊樂區生活大師會館</text:p>
          </table:table-cell>
          <table:table-cell office:value-type="string">
            <text:p>新竹縣</text:p>
          </table:table-cell>
          <table:table-cell office:value-type="string">
            <text:p>新竹縣新豐鄉松柏村康和路199號</text:p>
          </table:table-cell>
          <table:table-cell office:value-type="string">
            <text:p>(03)559213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巷內</text:p>
          </table:table-cell>
          <table:table-cell office:value-type="string">
            <text:p>桃園市</text:p>
          </table:table-cell>
          <table:table-cell office:value-type="string">
            <text:p>桃園市大溪區中央路52-3號</text:p>
          </table:table-cell>
          <table:table-cell office:value-type="string">
            <text:p>(03)388105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烏來山莊<text:s/></text:p>
          </table:table-cell>
          <table:table-cell office:value-type="string">
            <text:p>桃園市</text:p>
          </table:table-cell>
          <table:table-cell office:value-type="string">
            <text:p>桃園市復興區義盛里1鄰宇內路99號</text:p>
          </table:table-cell>
          <table:table-cell office:value-type="string">
            <text:p>(03)38211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琉球古拉克民宿<text:s/></text:p>
          </table:table-cell>
          <table:table-cell office:value-type="string">
            <text:p>屏東縣</text:p>
          </table:table-cell>
          <table:table-cell office:value-type="string">
            <text:p>屏東縣琉球鄉本福村中山路61-20號</text:p>
          </table:table-cell>
          <table:table-cell office:value-type="string">
            <text:p>(08)861222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形閣</text:p>
          </table:table-cell>
          <table:table-cell office:value-type="string">
            <text:p>宜蘭縣</text:p>
          </table:table-cell>
          <table:table-cell office:value-type="string">
            <text:p>宜蘭縣礁溪鄉中山路二段187號</text:p>
          </table:table-cell>
          <table:table-cell office:value-type="string">
            <text:p>(03)987232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鄰山林青年文旅</text:p>
          </table:table-cell>
          <table:table-cell office:value-type="string">
            <text:p>花蓮縣</text:p>
          </table:table-cell>
          <table:table-cell office:value-type="string">
            <text:p>花蓮縣玉里鎮大同路226.228號</text:p>
          </table:table-cell>
          <table:table-cell office:value-type="string">
            <text:p>(03)888722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仁義湖岸大酒店</text:p>
          </table:table-cell>
          <table:table-cell office:value-type="string">
            <text:p>嘉義縣</text:p>
          </table:table-cell>
          <table:table-cell office:value-type="string">
            <text:p>嘉義縣番路鄉內甕村後坑仔35號</text:p>
          </table:table-cell>
          <table:table-cell office:value-type="string">
            <text:p>(05)27693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今古安民宿</text:p>
          </table:table-cell>
          <table:table-cell office:value-type="string">
            <text:p>花蓮縣</text:p>
          </table:table-cell>
          <table:table-cell office:value-type="string">
            <text:p>花蓮縣花蓮市重慶路353巷30號</text:p>
          </table:table-cell>
          <table:table-cell office:value-type="string">
            <text:p>(03)83455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天成大飯店</text:p>
          </table:table-cell>
          <table:table-cell office:value-type="string">
            <text:p>臺北市</text:p>
          </table:table-cell>
          <table:table-cell office:value-type="string">
            <text:p>臺北市中正區忠孝西路一段43號</text:p>
          </table:table-cell>
          <table:table-cell office:value-type="string">
            <text:p>(02)23118905#37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太平⼭莊</text:p>
          </table:table-cell>
          <table:table-cell office:value-type="string">
            <text:p>宜蘭縣</text:p>
          </table:table-cell>
          <table:table-cell office:value-type="string">
            <text:p>宜蘭縣大同鄉太平村太平巷58之1號</text:p>
          </table:table-cell>
          <table:table-cell office:value-type="string">
            <text:p>(03)9545114#60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日森旅二館</text:p>
          </table:table-cell>
          <table:table-cell office:value-type="string">
            <text:p>彰化縣</text:p>
          </table:table-cell>
          <table:table-cell office:value-type="string">
            <text:p>彰化縣田尾鄉民族路一段185巷11號</text:p>
          </table:table-cell>
          <table:table-cell office:value-type="string">
            <text:p>(04)822166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月潭力麗溫德姆溫泉酒店</text:p>
          </table:table-cell>
          <table:table-cell office:value-type="string">
            <text:p>南投縣</text:p>
          </table:table-cell>
          <table:table-cell office:value-type="string">
            <text:p>南投縣魚池鄉日月村中正路312號</text:p>
          </table:table-cell>
          <table:table-cell office:value-type="string">
            <text:p>(049)2850085#88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玥居</text:p>
          </table:table-cell>
          <table:table-cell office:value-type="string">
            <text:p>金門縣</text:p>
          </table:table-cell>
          <table:table-cell office:value-type="string">
            <text:p>金門縣金寧鄉南山19號</text:p>
          </table:table-cell>
          <table:table-cell office:value-type="string">
            <text:p>(0987)39732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月光寶盒旅店</text:p>
          </table:table-cell>
          <table:table-cell office:value-type="string">
            <text:p>高雄市</text:p>
          </table:table-cell>
          <table:table-cell office:value-type="string">
            <text:p>高雄市鳳山區黃埔新村東一巷80號</text:p>
          </table:table-cell>
          <table:table-cell office:value-type="string">
            <text:p>(09)3363161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北投老爺酒店</text:p>
          </table:table-cell>
          <table:table-cell office:value-type="string">
            <text:p>臺北市</text:p>
          </table:table-cell>
          <table:table-cell office:value-type="string">
            <text:p>臺北市北投區中和街2號</text:p>
          </table:table-cell>
          <table:table-cell office:value-type="string">
            <text:p>(02)28966966#88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北投麗禧溫泉酒店</text:p>
          </table:table-cell>
          <table:table-cell office:value-type="string">
            <text:p>臺北市</text:p>
          </table:table-cell>
          <table:table-cell office:value-type="string">
            <text:p>臺北市北投區幽雅路30號</text:p>
          </table:table-cell>
          <table:table-cell office:value-type="string">
            <text:p>(02)28967799#73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李方艾美酒店</text:p>
          </table:table-cell>
          <table:table-cell office:value-type="string">
            <text:p>臺中市</text:p>
          </table:table-cell>
          <table:table-cell office:value-type="string">
            <text:p>臺中市中區建國路111號</text:p>
          </table:table-cell>
          <table:table-cell office:value-type="string">
            <text:p>(04)22240888#810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金典酒店</text:p>
          </table:table-cell>
          <table:table-cell office:value-type="string">
            <text:p>臺中市</text:p>
          </table:table-cell>
          <table:table-cell office:value-type="string">
            <text:p>臺中市西區健行路1049號</text:p>
          </table:table-cell>
          <table:table-cell office:value-type="string">
            <text:p>(04)23288000#669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港酒店</text:p>
          </table:table-cell>
          <table:table-cell office:value-type="string">
            <text:p>臺中市</text:p>
          </table:table-cell>
          <table:table-cell office:value-type="string">
            <text:p>臺中市梧棲區大智路二段388號</text:p>
          </table:table-cell>
          <table:table-cell office:value-type="string">
            <text:p>(04)37055888#612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W飯店</text:p>
          </table:table-cell>
          <table:table-cell office:value-type="string">
            <text:p>臺北市</text:p>
          </table:table-cell>
          <table:table-cell office:value-type="string">
            <text:p>臺北市信義區忠孝東路五段10號</text:p>
          </table:table-cell>
          <table:table-cell office:value-type="string">
            <text:p>(02)7703876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士林萬麗酒店</text:p>
          </table:table-cell>
          <table:table-cell office:value-type="string">
            <text:p>臺北市</text:p>
          </table:table-cell>
          <table:table-cell office:value-type="string">
            <text:p>臺北市士林區中山北路五段470巷8號</text:p>
          </table:table-cell>
          <table:table-cell office:value-type="string">
            <text:p>(02)8861238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九昱希爾頓逸林酒店</text:p>
          </table:table-cell>
          <table:table-cell office:value-type="string">
            <text:p>臺北市</text:p>
          </table:table-cell>
          <table:table-cell office:value-type="string">
            <text:p>臺北市中山區中山北路一段121巷1之1號, 121巷1號1樓至14樓</text:p>
          </table:table-cell>
          <table:table-cell office:value-type="string">
            <text:p>(02)6625328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雅樂軒酒店</text:p>
          </table:table-cell>
          <table:table-cell office:value-type="string">
            <text:p>臺北市</text:p>
          </table:table-cell>
          <table:table-cell office:value-type="string">
            <text:p>臺北市中山區雙城街1號</text:p>
          </table:table-cell>
          <table:table-cell office:value-type="string">
            <text:p>(02)774399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意舍酒店</text:p>
          </table:table-cell>
          <table:table-cell office:value-type="string">
            <text:p>臺北市</text:p>
          </table:table-cell>
          <table:table-cell office:value-type="string">
            <text:p>臺北市中山區中山北路二段57之1號1至8樓</text:p>
          </table:table-cell>
          <table:table-cell office:value-type="string">
            <text:p>(02)2565282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六福萬怡酒店</text:p>
          </table:table-cell>
          <table:table-cell office:value-type="string">
            <text:p>臺北市</text:p>
          </table:table-cell>
          <table:table-cell office:value-type="string">
            <text:p>臺北市南港區忠孝東路七段359號7至30樓</text:p>
          </table:table-cell>
          <table:table-cell office:value-type="string">
            <text:p>(02)66156565#50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艾麗酒店</text:p>
          </table:table-cell>
          <table:table-cell office:value-type="string">
            <text:p>臺北市</text:p>
          </table:table-cell>
          <table:table-cell office:value-type="string">
            <text:p>臺北市信義區松高路18號</text:p>
          </table:table-cell>
          <table:table-cell office:value-type="string">
            <text:p>(02)6631803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西門町意舍酒店</text:p>
          </table:table-cell>
          <table:table-cell office:value-type="string">
            <text:p>臺北市</text:p>
          </table:table-cell>
          <table:table-cell office:value-type="string">
            <text:p>臺北市萬華區武昌街2段77號5樓至10樓</text:p>
          </table:table-cell>
          <table:table-cell office:value-type="string">
            <text:p>(02)23755111#21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君品大酒店</text:p>
          </table:table-cell>
          <table:table-cell office:value-type="string">
            <text:p>臺北市</text:p>
          </table:table-cell>
          <table:table-cell office:value-type="string">
            <text:p>臺北市大同區承德路1段3號1樓、5樓~16樓及地下1樓、地下3樓</text:p>
          </table:table-cell>
          <table:table-cell office:value-type="string">
            <text:p>(02)21819999#314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松山意舍酒店</text:p>
          </table:table-cell>
          <table:table-cell office:value-type="string">
            <text:p>臺北市</text:p>
          </table:table-cell>
          <table:table-cell office:value-type="string">
            <text:p>臺北市南港區市民大道7段8號17樓至21樓</text:p>
          </table:table-cell>
          <table:table-cell office:value-type="string">
            <text:p>(02)26532828#21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花園大酒店</text:p>
          </table:table-cell>
          <table:table-cell office:value-type="string">
            <text:p>臺北市</text:p>
          </table:table-cell>
          <table:table-cell office:value-type="string">
            <text:p>臺北市中正區中華路2段1號</text:p>
          </table:table-cell>
          <table:table-cell office:value-type="string">
            <text:p>(02)23143300#315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旅人國際青年旅館</text:p>
          </table:table-cell>
          <table:table-cell office:value-type="string">
            <text:p>新北市</text:p>
          </table:table-cell>
          <table:table-cell office:value-type="string">
            <text:p>新北市淡水區三民街22、22之1、22之2、22之3、22之4號</text:p>
          </table:table-cell>
          <table:table-cell office:value-type="string">
            <text:p>(02)2625822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時代寓所</text:p>
          </table:table-cell>
          <table:table-cell office:value-type="string">
            <text:p>臺北市</text:p>
          </table:table-cell>
          <table:table-cell office:value-type="string">
            <text:p>臺北市中正區林森南路7號1至14樓，7-1號1樓</text:p>
          </table:table-cell>
          <table:table-cell office:value-type="string">
            <text:p>(02)775218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新板希爾頓酒店<text:s text:c="2"/><text:tab/></text:p>
          </table:table-cell>
          <table:table-cell office:value-type="string">
            <text:p>新北市</text:p>
          </table:table-cell>
          <table:table-cell office:value-type="string">
            <text:p>新北市板橋區民權路88號、88號（2至31樓）90號</text:p>
          </table:table-cell>
          <table:table-cell office:value-type="string">
            <text:p>(02)29583000#770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萬豪酒店</text:p>
          </table:table-cell>
          <table:table-cell office:value-type="string">
            <text:p>臺北市</text:p>
          </table:table-cell>
          <table:table-cell office:value-type="string">
            <text:p>臺北市中山區樂群二路199號</text:p>
          </table:table-cell>
          <table:table-cell office:value-type="string">
            <text:p>(02)21757999#17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遠東香格里拉</text:p>
          </table:table-cell>
          <table:table-cell office:value-type="string">
            <text:p>臺北市</text:p>
          </table:table-cell>
          <table:table-cell office:value-type="string">
            <text:p>臺北市大安區敦化南路二段201號</text:p>
          </table:table-cell>
          <table:table-cell office:value-type="string">
            <text:p>(02)23788888#660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東Deer<text:s text:c="2"/>House民宿</text:p>
          </table:table-cell>
          <table:table-cell office:value-type="string">
            <text:p>臺東縣</text:p>
          </table:table-cell>
          <table:table-cell office:value-type="string">
            <text:p>臺東縣鹿野鄉永安村1鄰永安路７１號</text:p>
          </table:table-cell>
          <table:table-cell office:value-type="string">
            <text:p>(089)5522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大員皇冠假日酒店</text:p>
          </table:table-cell>
          <table:table-cell office:value-type="string">
            <text:p>臺南市</text:p>
          </table:table-cell>
          <table:table-cell office:value-type="string">
            <text:p>臺南市安平區州平路289號</text:p>
          </table:table-cell>
          <table:table-cell office:value-type="string">
            <text:p>(06)5121888#60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大飯店</text:p>
          </table:table-cell>
          <table:table-cell office:value-type="string">
            <text:p>臺南市</text:p>
          </table:table-cell>
          <table:table-cell office:value-type="string">
            <text:p>臺南市中西區成功路1號</text:p>
          </table:table-cell>
          <table:table-cell office:value-type="string">
            <text:p>(06)2289101#201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安平雅樂軒酒店</text:p>
          </table:table-cell>
          <table:table-cell office:value-type="string">
            <text:p>臺南市</text:p>
          </table:table-cell>
          <table:table-cell office:value-type="string">
            <text:p>臺南市安平區光州路108號2-12樓、光州路108之1號</text:p>
          </table:table-cell>
          <table:table-cell office:value-type="string">
            <text:p>(06)3905000#86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老爺行旅</text:p>
          </table:table-cell>
          <table:table-cell office:value-type="string">
            <text:p>臺南市</text:p>
          </table:table-cell>
          <table:table-cell office:value-type="string">
            <text:p>臺南市東區中華東路一段368號1樓、6-10樓</text:p>
          </table:table-cell>
          <table:table-cell office:value-type="string">
            <text:p>(06)2361680#3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遠東香格里拉</text:p>
          </table:table-cell>
          <table:table-cell office:value-type="string">
            <text:p>臺南市</text:p>
          </table:table-cell>
          <table:table-cell office:value-type="string">
            <text:p>臺南市東區大學路西段89號</text:p>
          </table:table-cell>
          <table:table-cell office:value-type="string">
            <text:p>(06)7028888#69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台北會館</text:p>
          </table:table-cell>
          <table:table-cell office:value-type="string">
            <text:p>臺北市</text:p>
          </table:table-cell>
          <table:table-cell office:value-type="string">
            <text:p>臺北市中正區中華路一段39號3至5樓</text:p>
          </table:table-cell>
          <table:table-cell office:value-type="string">
            <text:p>(02)23885522#50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花蓮旅館</text:p>
          </table:table-cell>
          <table:table-cell office:value-type="string">
            <text:p>花蓮縣</text:p>
          </table:table-cell>
          <table:table-cell office:value-type="string">
            <text:p>花蓮縣光復鄉大進村糖廠街19號</text:p>
          </table:table-cell>
          <table:table-cell office:value-type="string">
            <text:p>(03)8704125#62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長榮酒店(台南)</text:p>
          </table:table-cell>
          <table:table-cell office:value-type="string">
            <text:p>臺南市</text:p>
          </table:table-cell>
          <table:table-cell office:value-type="string">
            <text:p>臺南市東區中華東路三段336巷1號</text:p>
          </table:table-cell>
          <table:table-cell office:value-type="string">
            <text:p>(06)3378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灣糖業股份有限公司池上牧野渡假村</text:p>
          </table:table-cell>
          <table:table-cell office:value-type="string">
            <text:p>臺東縣</text:p>
          </table:table-cell>
          <table:table-cell office:value-type="string">
            <text:p>臺東縣池上鄉新興村新興110號</text:p>
          </table:table-cell>
          <table:table-cell office:value-type="string">
            <text:p>(089)862736#10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四季時光</text:p>
          </table:table-cell>
          <table:table-cell office:value-type="string">
            <text:p>南投縣</text:p>
          </table:table-cell>
          <table:table-cell office:value-type="string">
            <text:p>南投縣魚池鄉頭社村平和巷103-11號</text:p>
          </table:table-cell>
          <table:table-cell office:value-type="string">
            <text:p>(0932)37676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巨蛋旅店</text:p>
          </table:table-cell>
          <table:table-cell office:value-type="string">
            <text:p>高雄市</text:p>
          </table:table-cell>
          <table:table-cell office:value-type="string">
            <text:p>高雄市鼓山區文忠路1號</text:p>
          </table:table-cell>
          <table:table-cell office:value-type="string">
            <text:p>(07)5868388#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打個蛋海旅民宿</text:p>
          </table:table-cell>
          <table:table-cell office:value-type="string">
            <text:p>臺東縣</text:p>
          </table:table-cell>
          <table:table-cell office:value-type="string">
            <text:p>臺東縣太麻里鄉金崙4鄰129號</text:p>
          </table:table-cell>
          <table:table-cell office:value-type="string">
            <text:p>(089)77155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正好友生態環保旅店</text:p>
          </table:table-cell>
          <table:table-cell office:value-type="string">
            <text:p>屏東縣</text:p>
          </table:table-cell>
          <table:table-cell office:value-type="string">
            <text:p>屏東縣琉球鄉中山路153號</text:p>
          </table:table-cell>
          <table:table-cell office:value-type="string">
            <text:p>(0886)122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甲桂林商務旅館</text:p>
          </table:table-cell>
          <table:table-cell office:value-type="string">
            <text:p>桃園市</text:p>
          </table:table-cell>
          <table:table-cell office:value-type="string">
            <text:p>桃園市蘆竹區桃園街106號</text:p>
          </table:table-cell>
          <table:table-cell office:value-type="string">
            <text:p>03-311679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伊塔原旅臺東縣原住民文化會館</text:p>
          </table:table-cell>
          <table:table-cell office:value-type="string">
            <text:p>臺東縣</text:p>
          </table:table-cell>
          <table:table-cell office:value-type="string">
            <text:p>臺東縣台東市中山路10號</text:p>
          </table:table-cell>
          <table:table-cell office:value-type="string">
            <text:p>(089)3406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兆品酒店</text:p>
          </table:table-cell>
          <table:table-cell office:value-type="string">
            <text:p>嘉義市</text:p>
          </table:table-cell>
          <table:table-cell office:value-type="string">
            <text:p>嘉義市文化路257號B2-9F</text:p>
          </table:table-cell>
          <table:table-cell office:value-type="string">
            <text:p>(05)2292883#313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好室民宿</text:p>
          </table:table-cell>
          <table:table-cell office:value-type="string">
            <text:p>臺東縣</text:p>
          </table:table-cell>
          <table:table-cell office:value-type="string">
            <text:p>臺東縣台東市中正路251巷9號</text:p>
          </table:table-cell>
          <table:table-cell office:value-type="string">
            <text:p>(0905)58375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如一家精緻民宿</text:p>
          </table:table-cell>
          <table:table-cell office:value-type="string">
            <text:p>金門縣</text:p>
          </table:table-cell>
          <table:table-cell office:value-type="string">
            <text:p>金門縣金城鎮珠浦北路35-1號</text:p>
          </table:table-cell>
          <table:table-cell office:value-type="string">
            <text:p>(082)32216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老公老婆友善民宿</text:p>
          </table:table-cell>
          <table:table-cell office:value-type="string">
            <text:p>宜蘭縣</text:p>
          </table:table-cell>
          <table:table-cell office:value-type="string">
            <text:p>宜蘭縣冬山鄉境安路345號</text:p>
          </table:table-cell>
          <table:table-cell office:value-type="string">
            <text:p>(03) 95190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老爺大酒店</text:p>
          </table:table-cell>
          <table:table-cell office:value-type="string">
            <text:p>臺北市</text:p>
          </table:table-cell>
          <table:table-cell office:value-type="string">
            <text:p>臺北市中山區中山北路2段37-1號</text:p>
          </table:table-cell>
          <table:table-cell office:value-type="string">
            <text:p>(02)25423299#35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亞昕福朋喜來登酒店</text:p>
          </table:table-cell>
          <table:table-cell office:value-type="string">
            <text:p>新北市</text:p>
          </table:table-cell>
          <table:table-cell office:value-type="string">
            <text:p>新北市林口區文化三路一段1號、1號2樓、1號3樓</text:p>
          </table:table-cell>
          <table:table-cell office:value-type="string">
            <text:p>(02)7727696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亞都麗緻大飯店</text:p>
          </table:table-cell>
          <table:table-cell office:value-type="string">
            <text:p>臺北市</text:p>
          </table:table-cell>
          <table:table-cell office:value-type="string">
            <text:p>臺北市中山區民權東路2段41號</text:p>
          </table:table-cell>
          <table:table-cell office:value-type="string">
            <text:p>027735236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享沐時光</text:p>
          </table:table-cell>
          <table:table-cell office:value-type="string">
            <text:p>苗栗縣</text:p>
          </table:table-cell>
          <table:table-cell office:value-type="string">
            <text:p>苗栗縣苑裡鎮石鎮里錦山8-1,8-2號</text:p>
          </table:table-cell>
          <table:table-cell office:value-type="string">
            <text:p>(037)742878#12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享豪大飯店</text:p>
          </table:table-cell>
          <table:table-cell office:value-type="string">
            <text:p>新竹縣</text:p>
          </table:table-cell>
          <table:table-cell office:value-type="string">
            <text:p>新竹縣竹北市信義街7號</text:p>
          </table:table-cell>
          <table:table-cell office:value-type="string">
            <text:p>(03)65655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．高雄中山館</text:p>
          </table:table-cell>
          <table:table-cell office:value-type="string">
            <text:p>高雄市</text:p>
          </table:table-cell>
          <table:table-cell office:value-type="string">
            <text:p>高雄市前鎮區中山二路260號22-29樓</text:p>
          </table:table-cell>
          <table:table-cell office:value-type="string">
            <text:p>(07)97566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·台南西門館</text:p>
          </table:table-cell>
          <table:table-cell office:value-type="string">
            <text:p>臺南市</text:p>
          </table:table-cell>
          <table:table-cell office:value-type="string">
            <text:p>臺南市中西區西門路一段658之2號4樓至13樓</text:p>
          </table:table-cell>
          <table:table-cell office:value-type="string">
            <text:p>(06)702668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飯店桃園青埔館</text:p>
          </table:table-cell>
          <table:table-cell office:value-type="string">
            <text:p>桃園市</text:p>
          </table:table-cell>
          <table:table-cell office:value-type="string">
            <text:p>桃園市中壢區春德路101號</text:p>
          </table:table-cell>
          <table:table-cell office:value-type="string">
            <text:p>(03)2737692#21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幸福蝸牛</text:p>
          </table:table-cell>
          <table:table-cell office:value-type="string">
            <text:p>宜蘭縣</text:p>
          </table:table-cell>
          <table:table-cell office:value-type="string">
            <text:p>宜蘭縣五結鄉利澤西路6號</text:p>
          </table:table-cell>
          <table:table-cell office:value-type="string">
            <text:p>(03)950004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承萬尊爵渡假酒店</text:p>
          </table:table-cell>
          <table:table-cell office:value-type="string">
            <text:p>南投縣</text:p>
          </table:table-cell>
          <table:table-cell office:value-type="string">
            <text:p>南投縣埔里鎮樹人路131號</text:p>
          </table:table-cell>
          <table:table-cell office:value-type="string">
            <text:p>(049)2995757#631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承億酒店股份有限公司</text:p>
          </table:table-cell>
          <table:table-cell office:value-type="string">
            <text:p>高雄市</text:p>
          </table:table-cell>
          <table:table-cell office:value-type="string">
            <text:p>高雄市前鎮區林森四路189號</text:p>
          </table:table-cell>
          <table:table-cell office:value-type="string">
            <text:p>07333399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板橋凱撒大飯店</text:p>
          </table:table-cell>
          <table:table-cell office:value-type="string">
            <text:p>新北市</text:p>
          </table:table-cell>
          <table:table-cell office:value-type="string">
            <text:p>新北市板橋區縣民大道二段8號</text:p>
          </table:table-cell>
          <table:table-cell office:value-type="string">
            <text:p>(02)29583000#7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武陵國民賓館</text:p>
          </table:table-cell>
          <table:table-cell office:value-type="string">
            <text:p>臺中市</text:p>
          </table:table-cell>
          <table:table-cell office:value-type="string">
            <text:p>臺中市和平區平等里武陵路3-1號</text:p>
          </table:table-cell>
          <table:table-cell office:value-type="string">
            <text:p>(04)25901258#21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武陵富野渡假村</text:p>
          </table:table-cell>
          <table:table-cell office:value-type="string">
            <text:p>臺中市</text:p>
          </table:table-cell>
          <table:table-cell office:value-type="string">
            <text:p>臺中市和平區武陵路3-16號</text:p>
          </table:table-cell>
          <table:table-cell office:value-type="string">
            <text:p>(04)25901399#891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河那灣</text:p>
          </table:table-cell>
          <table:table-cell office:value-type="string">
            <text:p>桃園市</text:p>
          </table:table-cell>
          <table:table-cell office:value-type="string">
            <text:p>桃園市復興區澤仁里3鄰溪口台41號</text:p>
          </table:table-cell>
          <table:table-cell office:value-type="string">
            <text:p>(0919)235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波西米亞民宿</text:p>
          </table:table-cell>
          <table:table-cell office:value-type="string">
            <text:p>花蓮縣</text:p>
          </table:table-cell>
          <table:table-cell office:value-type="string">
            <text:p>花蓮縣吉安鄉東昌村13鄰東海一街168號</text:p>
          </table:table-cell>
          <table:table-cell office:value-type="string">
            <text:p>(0385)3123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泡泡森林民宿</text:p>
          </table:table-cell>
          <table:table-cell office:value-type="string">
            <text:p>臺東縣</text:p>
          </table:table-cell>
          <table:table-cell office:value-type="string">
            <text:p>臺東縣台東市南一街40號</text:p>
          </table:table-cell>
          <table:table-cell office:value-type="string">
            <text:p>09868665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泊寓</text:p>
          </table:table-cell>
          <table:table-cell office:value-type="string">
            <text:p>彰化縣</text:p>
          </table:table-cell>
          <table:table-cell office:value-type="string">
            <text:p>彰化縣鹿港鎮鹿興路57巷3號</text:p>
          </table:table-cell>
          <table:table-cell office:value-type="string">
            <text:p>(04)7115655#1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爸爸萬歲民宿</text:p>
          </table:table-cell>
          <table:table-cell office:value-type="string">
            <text:p>花蓮縣</text:p>
          </table:table-cell>
          <table:table-cell office:value-type="string">
            <text:p>花蓮縣花蓮市延平街68巷27號</text:p>
          </table:table-cell>
          <table:table-cell office:value-type="string">
            <text:p>(0900)7575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迎曦大飯店</text:p>
          </table:table-cell>
          <table:table-cell office:value-type="string">
            <text:p>新竹市</text:p>
          </table:table-cell>
          <table:table-cell office:value-type="string">
            <text:p>新竹市東區親仁里文化街10號2-10樓</text:p>
          </table:table-cell>
          <table:table-cell office:value-type="string">
            <text:p>(03)5347266#1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金湖飯店</text:p>
          </table:table-cell>
          <table:table-cell office:value-type="string">
            <text:p>金門縣</text:p>
          </table:table-cell>
          <table:table-cell office:value-type="string">
            <text:p>金門縣金湖鎮太湖路二段218號</text:p>
          </table:table-cell>
          <table:table-cell office:value-type="string">
            <text:p>(082)379666#16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文苑酒店(嘉義)</text:p>
          </table:table-cell>
          <table:table-cell office:value-type="string">
            <text:p>嘉義縣</text:p>
          </table:table-cell>
          <table:table-cell office:value-type="string">
            <text:p>嘉義縣太保市東勢里故宮大道777號</text:p>
          </table:table-cell>
          <table:table-cell office:value-type="string">
            <text:p>(05)3669988#270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台中)</text:p>
          </table:table-cell>
          <table:table-cell office:value-type="string">
            <text:p>臺中市</text:p>
          </table:table-cell>
          <table:table-cell office:value-type="string">
            <text:p>臺中市西屯區臺灣大道二段666號</text:p>
          </table:table-cell>
          <table:table-cell office:value-type="string">
            <text:p>(04)23242236#270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台北)</text:p>
          </table:table-cell>
          <table:table-cell office:value-type="string">
            <text:p>臺北市</text:p>
          </table:table-cell>
          <table:table-cell office:value-type="string">
            <text:p>臺北市中山區松江路63號</text:p>
          </table:table-cell>
          <table:table-cell office:value-type="string">
            <text:p>(02)25019988#2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基隆)</text:p>
          </table:table-cell>
          <table:table-cell office:value-type="string">
            <text:p>基隆市</text:p>
          </table:table-cell>
          <table:table-cell office:value-type="string">
            <text:p>基隆市中正區中正路62號之1</text:p>
          </table:table-cell>
          <table:table-cell office:value-type="string">
            <text:p>(02)242799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鳳凰酒店(礁溪)</text:p>
          </table:table-cell>
          <table:table-cell office:value-type="string">
            <text:p>宜蘭縣</text:p>
          </table:table-cell>
          <table:table-cell office:value-type="string">
            <text:p>宜蘭縣礁溪鄉健康路77號</text:p>
          </table:table-cell>
          <table:table-cell office:value-type="string">
            <text:p>(03)9100988#233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東方明珠國際大飯店</text:p>
          </table:table-cell>
          <table:table-cell office:value-type="string">
            <text:p>嘉義縣</text:p>
          </table:table-cell>
          <table:table-cell office:value-type="string">
            <text:p>嘉義縣中埔鄉社口村檨仔林23號</text:p>
          </table:table-cell>
          <table:table-cell office:value-type="string">
            <text:p>(05)25369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英迪格酒店</text:p>
          </table:table-cell>
          <table:table-cell office:value-type="string">
            <text:p>嘉義縣</text:p>
          </table:table-cell>
          <table:table-cell office:value-type="string">
            <text:p>嘉義縣番路鄉公田村2鄰龍頭20號2樓之1等10筆</text:p>
          </table:table-cell>
          <table:table-cell office:value-type="string">
            <text:p>(05)2586800#12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賓館（現代館）</text:p>
          </table:table-cell>
          <table:table-cell office:value-type="string">
            <text:p>嘉義縣</text:p>
          </table:table-cell>
          <table:table-cell office:value-type="string">
            <text:p>嘉義縣阿里山鄉香林村西阿里山16-1號</text:p>
          </table:table-cell>
          <table:table-cell office:value-type="string">
            <text:p>(05)2679996#511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南港老爺行旅</text:p>
          </table:table-cell>
          <table:table-cell office:value-type="string">
            <text:p>臺北市</text:p>
          </table:table-cell>
          <table:table-cell office:value-type="string">
            <text:p>臺北市南港區經貿二路196號、196號10樓至20樓</text:p>
          </table:table-cell>
          <table:table-cell office:value-type="string">
            <text:p>(02)775005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美麗島館(HOTEL PAPA WHALE)</text:p>
          </table:table-cell>
          <table:table-cell office:value-type="string">
            <text:p>高雄市</text:p>
          </table:table-cell>
          <table:table-cell office:value-type="string">
            <text:p>高雄市新興區民生一路328號1-7樓</text:p>
          </table:table-cell>
          <table:table-cell office:value-type="string">
            <text:p>(07)2519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高雄真愛館</text:p>
          </table:table-cell>
          <table:table-cell office:value-type="string">
            <text:p>高雄市</text:p>
          </table:table-cell>
          <table:table-cell office:value-type="string">
            <text:p>高雄市鹽埕區大義街1號</text:p>
          </table:table-cell>
          <table:table-cell office:value-type="string">
            <text:p>(07)5215116#9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駁二館</text:p>
          </table:table-cell>
          <table:table-cell office:value-type="string">
            <text:p>高雄市</text:p>
          </table:table-cell>
          <table:table-cell office:value-type="string">
            <text:p>高雄市鹽埕區公園二路83號1至11樓</text:p>
          </table:table-cell>
          <table:table-cell office:value-type="string">
            <text:p>(07)532277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德立莊博愛館</text:p>
          </table:table-cell>
          <table:table-cell office:value-type="string">
            <text:p>高雄市</text:p>
          </table:table-cell>
          <table:table-cell office:value-type="string">
            <text:p>高雄市三民區博愛一路338號地上1至10樓</text:p>
          </table:table-cell>
          <table:table-cell office:value-type="string">
            <text:p>(07)3238777#93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8藝宿</text:p>
          </table:table-cell>
          <table:table-cell office:value-type="string">
            <text:p>宜蘭縣</text:p>
          </table:table-cell>
          <table:table-cell office:value-type="string">
            <text:p>宜蘭縣三星鄉中山路三段192巷8號</text:p>
          </table:table-cell>
          <table:table-cell office:value-type="string">
            <text:p>(0932)4952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漾商旅</text:p>
          </table:table-cell>
          <table:table-cell office:value-type="string">
            <text:p>臺中市</text:p>
          </table:table-cell>
          <table:table-cell office:value-type="string">
            <text:p>臺中市北區錦南街17號,錦新街30號4樓至9樓,錦新街32號4樓至9樓</text:p>
          </table:table-cell>
          <table:table-cell office:value-type="string">
            <text:p>(04)2228900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漾商旅(中清館)</text:p>
          </table:table-cell>
          <table:table-cell office:value-type="string">
            <text:p>臺中市</text:p>
          </table:table-cell>
          <table:table-cell office:value-type="string">
            <text:p>臺中市北區中清路一段63號</text:p>
          </table:table-cell>
          <table:table-cell office:value-type="string">
            <text:p>(04)22083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柳營尖山埤渡假村</text:p>
          </table:table-cell>
          <table:table-cell office:value-type="string">
            <text:p>臺南市</text:p>
          </table:table-cell>
          <table:table-cell office:value-type="string">
            <text:p>臺南市柳營區旭山里60號</text:p>
          </table:table-cell>
          <table:table-cell office:value-type="string">
            <text:p>066233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之旅商務飯店</text:p>
          </table:table-cell>
          <table:table-cell office:value-type="string">
            <text:p>臺中市</text:p>
          </table:table-cell>
          <table:table-cell office:value-type="string">
            <text:p>臺中市西區美村路一段269號1樓、2樓之1、2樓之2、3、4、5、6、7樓</text:p>
          </table:table-cell>
          <table:table-cell office:value-type="string">
            <text:p>(04)2302433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侖商旅</text:p>
          </table:table-cell>
          <table:table-cell office:value-type="string">
            <text:p>臺北市</text:p>
          </table:table-cell>
          <table:table-cell office:value-type="string">
            <text:p>臺北市中山區吉林路49號1至8樓</text:p>
          </table:table-cell>
          <table:table-cell office:value-type="string">
            <text:p>(02)25313535#87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墅館</text:p>
          </table:table-cell>
          <table:table-cell office:value-type="string">
            <text:p>臺南市</text:p>
          </table:table-cell>
          <table:table-cell office:value-type="string">
            <text:p>臺南市善化區昌隆里9鄰東勢寮131之8號</text:p>
          </table:table-cell>
          <table:table-cell office:value-type="string">
            <text:p>(09)2065690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綠民宿</text:p>
          </table:table-cell>
          <table:table-cell office:value-type="string">
            <text:p>高雄市</text:p>
          </table:table-cell>
          <table:table-cell office:value-type="string">
            <text:p>高雄市美濃區獅山里竹門14-2號</text:p>
          </table:table-cell>
          <table:table-cell office:value-type="string">
            <text:p>(07)6851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夏堤民宿</text:p>
          </table:table-cell>
          <table:table-cell office:value-type="string">
            <text:p>屏東縣</text:p>
          </table:table-cell>
          <table:table-cell office:value-type="string">
            <text:p>屏東縣琉球鄉上福村2鄰杉板路51巷2號</text:p>
          </table:table-cell>
          <table:table-cell office:value-type="string">
            <text:p>(08)86111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夏優旅居</text:p>
          </table:table-cell>
          <table:table-cell office:value-type="string">
            <text:p>高雄市</text:p>
          </table:table-cell>
          <table:table-cell office:value-type="string">
            <text:p>高雄市鹽埕區新興街67號</text:p>
          </table:table-cell>
          <table:table-cell office:value-type="string">
            <text:p>(07)532888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花園酒店</text:p>
          </table:table-cell>
          <table:table-cell office:value-type="string">
            <text:p>臺東縣</text:p>
          </table:table-cell>
          <table:table-cell office:value-type="string">
            <text:p>臺東縣台東市新興路77號</text:p>
          </table:table-cell>
          <table:table-cell office:value-type="string">
            <text:p>(089)231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會館</text:p>
          </table:table-cell>
          <table:table-cell office:value-type="string">
            <text:p>臺東縣</text:p>
          </table:table-cell>
          <table:table-cell office:value-type="string">
            <text:p>臺東縣台東市中興路2段385號</text:p>
          </table:table-cell>
          <table:table-cell office:value-type="string">
            <text:p>(089)2355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銀河行館</text:p>
          </table:table-cell>
          <table:table-cell office:value-type="string">
            <text:p>臺東縣</text:p>
          </table:table-cell>
          <table:table-cell office:value-type="string">
            <text:p>臺東縣台東市豐興路88號</text:p>
          </table:table-cell>
          <table:table-cell office:value-type="string">
            <text:p>(089)3833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銀河酒店</text:p>
          </table:table-cell>
          <table:table-cell office:value-type="string">
            <text:p>臺東縣</text:p>
          </table:table-cell>
          <table:table-cell office:value-type="string">
            <text:p>臺東縣台東市豐興路66號</text:p>
          </table:table-cell>
          <table:table-cell office:value-type="string">
            <text:p>(089)225000#826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悅徠舘</text:p>
          </table:table-cell>
          <table:table-cell office:value-type="string">
            <text:p>桃園市</text:p>
          </table:table-cell>
          <table:table-cell office:value-type="string">
            <text:p>桃園市龜山區興華三街18號2樓之1</text:p>
          </table:table-cell>
          <table:table-cell office:value-type="string">
            <text:p>(03)328017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旅行邦尼</text:p>
          </table:table-cell>
          <table:table-cell office:value-type="string">
            <text:p>新北市</text:p>
          </table:table-cell>
          <table:table-cell office:value-type="string">
            <text:p>新北市淡水區中山路87巷7號</text:p>
          </table:table-cell>
          <table:table-cell office:value-type="string">
            <text:p>(09)2882485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旅悅國際青年旅館</text:p>
          </table:table-cell>
          <table:table-cell office:value-type="string">
            <text:p>高雄市</text:p>
          </table:table-cell>
          <table:table-cell office:value-type="string">
            <text:p>高雄市前鎮區三多三路211號3樓及4樓</text:p>
          </table:table-cell>
          <table:table-cell office:value-type="string">
            <text:p>(07)335900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桃園大溪笠復威斯汀度假酒店</text:p>
          </table:table-cell>
          <table:table-cell office:value-type="string">
            <text:p>桃園市</text:p>
          </table:table-cell>
          <table:table-cell office:value-type="string">
            <text:p>桃園市大溪區日新路166號</text:p>
          </table:table-cell>
          <table:table-cell office:value-type="string">
            <text:p>(03)272503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桃園喜來登酒店</text:p>
          </table:table-cell>
          <table:table-cell office:value-type="string">
            <text:p>桃園市</text:p>
          </table:table-cell>
          <table:table-cell office:value-type="string">
            <text:p>桃園市大園區大觀路777號</text:p>
          </table:table-cell>
          <table:table-cell office:value-type="string">
            <text:p>(03)3850000#26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泰安觀止溫泉會館</text:p>
          </table:table-cell>
          <table:table-cell office:value-type="string">
            <text:p>苗栗縣</text:p>
          </table:table-cell>
          <table:table-cell office:value-type="string">
            <text:p>苗栗縣泰安鄉錦水村圓墩58-7號</text:p>
          </table:table-cell>
          <table:table-cell office:value-type="string">
            <text:p>(037)941951#52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海霞您的家</text:p>
          </table:table-cell>
          <table:table-cell office:value-type="string">
            <text:p>新北市</text:p>
          </table:table-cell>
          <table:table-cell office:value-type="string">
            <text:p>新北市貢寮區仁里里14鄰仁愛路38號</text:p>
          </table:table-cell>
          <table:table-cell office:value-type="string">
            <text:p>(09)3520489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海灣假日酒店</text:p>
          </table:table-cell>
          <table:table-cell office:value-type="string">
            <text:p>新北市</text:p>
          </table:table-cell>
          <table:table-cell office:value-type="string">
            <text:p>新北市深坑區北深路3段265號</text:p>
          </table:table-cell>
          <table:table-cell office:value-type="string">
            <text:p>(02)7703588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神隱國度民宿</text:p>
          </table:table-cell>
          <table:table-cell office:value-type="string">
            <text:p>新北市</text:p>
          </table:table-cell>
          <table:table-cell office:value-type="string">
            <text:p>新北市瑞芳區崙頂路90號</text:p>
          </table:table-cell>
          <table:table-cell office:value-type="string">
            <text:p>(09)0578865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秧悦美地度假酒店</text:p>
          </table:table-cell>
          <table:table-cell office:value-type="string">
            <text:p>花蓮縣</text:p>
          </table:table-cell>
          <table:table-cell office:value-type="string">
            <text:p>花蓮縣吉安鄉干城村干城二街95-9號</text:p>
          </table:table-cell>
          <table:table-cell office:value-type="string">
            <text:p>(03)8129168#27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秘境41</text:p>
          </table:table-cell>
          <table:table-cell office:value-type="string">
            <text:p>桃園市</text:p>
          </table:table-cell>
          <table:table-cell office:value-type="string">
            <text:p>桃園市大溪區興和里中央路41號</text:p>
          </table:table-cell>
          <table:table-cell office:value-type="string">
            <text:p>(03)3887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秘境民宿</text:p>
          </table:table-cell>
          <table:table-cell office:value-type="string">
            <text:p>屏東縣</text:p>
          </table:table-cell>
          <table:table-cell office:value-type="string">
            <text:p>屏東縣東港鎮屏東縣東港鎮水源路223號(新和段737-3地號)</text:p>
          </table:table-cell>
          <table:table-cell office:value-type="string">
            <text:p>(08)83333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中央公園英迪格酒店</text:p>
          </table:table-cell>
          <table:table-cell office:value-type="string">
            <text:p>高雄市</text:p>
          </table:table-cell>
          <table:table-cell office:value-type="string">
            <text:p>高雄市新興區中山一路4號</text:p>
          </table:table-cell>
          <table:table-cell office:value-type="string">
            <text:p>(07)2721555#3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洲際酒店</text:p>
          </table:table-cell>
          <table:table-cell office:value-type="string">
            <text:p>高雄市</text:p>
          </table:table-cell>
          <table:table-cell office:value-type="string">
            <text:p>高雄市前鎮區新光路33號 1樓、3~16樓</text:p>
          </table:table-cell>
          <table:table-cell office:value-type="string">
            <text:p>(07)213200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商旅</text:p>
          </table:table-cell>
          <table:table-cell office:value-type="string">
            <text:p>高雄市</text:p>
          </table:table-cell>
          <table:table-cell office:value-type="string">
            <text:p>高雄市新興區民族二路33號1、4~10樓；37號1、3~10樓</text:p>
          </table:table-cell>
          <table:table-cell office:value-type="string">
            <text:p>(09)1954659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富野渡假酒店</text:p>
          </table:table-cell>
          <table:table-cell office:value-type="string">
            <text:p>高雄市</text:p>
          </table:table-cell>
          <table:table-cell office:value-type="string">
            <text:p>高雄市前鎮區瑞田街99號</text:p>
          </table:table-cell>
          <table:table-cell office:value-type="string">
            <text:p>(07)8215299#710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圓山大飯店</text:p>
          </table:table-cell>
          <table:table-cell office:value-type="string">
            <text:p>高雄市</text:p>
          </table:table-cell>
          <table:table-cell office:value-type="string">
            <text:p>高雄市鳥松區圓山路2號</text:p>
          </table:table-cell>
          <table:table-cell office:value-type="string">
            <text:p>(07)3706007#51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福華大飯店</text:p>
          </table:table-cell>
          <table:table-cell office:value-type="string">
            <text:p>高雄市</text:p>
          </table:table-cell>
          <table:table-cell office:value-type="string">
            <text:p>高雄市新興區七賢一路311號</text:p>
          </table:table-cell>
          <table:table-cell office:value-type="string">
            <text:p>(07)230773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基拉耳景觀民宿</text:p>
          </table:table-cell>
          <table:table-cell office:value-type="string">
            <text:p>桃園市</text:p>
          </table:table-cell>
          <table:table-cell office:value-type="string">
            <text:p>桃園市復興區溪口路16巷29號</text:p>
          </table:table-cell>
          <table:table-cell office:value-type="string">
            <text:p>(02)23965188#59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將捷金鬱金香酒店</text:p>
          </table:table-cell>
          <table:table-cell office:value-type="string">
            <text:p>新北市</text:p>
          </table:table-cell>
          <table:table-cell office:value-type="string">
            <text:p>新北市淡水區中正路1段2之1號(A區地上3至6層、B區地上1至5層、C區地下3層至地上3層)</text:p>
          </table:table-cell>
          <table:table-cell office:value-type="string">
            <text:p>(02)26218555#291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康橋商旅-六合夜市七賢館</text:p>
          </table:table-cell>
          <table:table-cell office:value-type="string">
            <text:p>高雄市</text:p>
          </table:table-cell>
          <table:table-cell office:value-type="string">
            <text:p>高雄市新興區同愛街28號1樓、30號</text:p>
          </table:table-cell>
          <table:table-cell office:value-type="string">
            <text:p>(07)288-55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 台南虎山館</text:p>
          </table:table-cell>
          <table:table-cell office:value-type="string">
            <text:p>臺南市</text:p>
          </table:table-cell>
          <table:table-cell office:value-type="string">
            <text:p>臺南市仁德區成功里5鄰文華路2段300號1~9樓，地下一、二樓</text:p>
          </table:table-cell>
          <table:table-cell office:value-type="string">
            <text:p>(06)2662218#832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台北三重館</text:p>
          </table:table-cell>
          <table:table-cell office:value-type="string">
            <text:p>新北市</text:p>
          </table:table-cell>
          <table:table-cell office:value-type="string">
            <text:p>新北市三重區三和路四段107-1號</text:p>
          </table:table-cell>
          <table:table-cell office:value-type="string">
            <text:p>(02)22806111#83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西門町店</text:p>
          </table:table-cell>
          <table:table-cell office:value-type="string">
            <text:p>臺北市</text:p>
          </table:table-cell>
          <table:table-cell office:value-type="string">
            <text:p>臺北市中正區中華路一段41號5樓至9樓</text:p>
          </table:table-cell>
          <table:table-cell office:value-type="string">
            <text:p>(02)25215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花蓮中正館</text:p>
          </table:table-cell>
          <table:table-cell office:value-type="string">
            <text:p>花蓮縣</text:p>
          </table:table-cell>
          <table:table-cell office:value-type="string">
            <text:p>花蓮縣花蓮市主睦里14鄰中正路396號</text:p>
          </table:table-cell>
          <table:table-cell office:value-type="string">
            <text:p>(03)8900069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高雄中正館</text:p>
          </table:table-cell>
          <table:table-cell office:value-type="string">
            <text:p>高雄市</text:p>
          </table:table-cell>
          <table:table-cell office:value-type="string">
            <text:p>高雄市苓雅區中正一路134號</text:p>
          </table:table-cell>
          <table:table-cell office:value-type="string">
            <text:p>(07)9733587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高雄站前館</text:p>
          </table:table-cell>
          <table:table-cell office:value-type="string">
            <text:p>高雄市</text:p>
          </table:table-cell>
          <table:table-cell office:value-type="string">
            <text:p>高雄市新興區中山一路280號1至14樓</text:p>
          </table:table-cell>
          <table:table-cell office:value-type="string">
            <text:p>(07)9733587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臺大尊賢館</text:p>
          </table:table-cell>
          <table:table-cell office:value-type="string">
            <text:p>臺北市</text:p>
          </table:table-cell>
          <table:table-cell office:value-type="string">
            <text:p>臺北市大安區羅斯福路四段83號1-10樓</text:p>
          </table:table-cell>
          <table:table-cell office:value-type="string">
            <text:p>(02)773550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礁溪館</text:p>
          </table:table-cell>
          <table:table-cell office:value-type="string">
            <text:p>宜蘭縣</text:p>
          </table:table-cell>
          <table:table-cell office:value-type="string">
            <text:p>宜蘭縣礁溪鄉德陽路24巷8號、10號</text:p>
          </table:table-cell>
          <table:table-cell office:value-type="string">
            <text:p>(03)9102000#810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清新溫泉飯店</text:p>
          </table:table-cell>
          <table:table-cell office:value-type="string">
            <text:p>臺中市</text:p>
          </table:table-cell>
          <table:table-cell office:value-type="string">
            <text:p>臺中市烏日區溫泉路2號</text:p>
          </table:table-cell>
          <table:table-cell office:value-type="string">
            <text:p>(04)23831088#76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統一谷關渡假村</text:p>
          </table:table-cell>
          <table:table-cell office:value-type="string">
            <text:p>臺中市</text:p>
          </table:table-cell>
          <table:table-cell office:value-type="string">
            <text:p>臺中市和平區博愛里東關路一段188號</text:p>
          </table:table-cell>
          <table:table-cell office:value-type="string">
            <text:p>(04)25950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統一渡假村</text:p>
          </table:table-cell>
          <table:table-cell office:value-type="string">
            <text:p>新竹縣</text:p>
          </table:table-cell>
          <table:table-cell office:value-type="string">
            <text:p>新竹縣關西鎮金山里34號</text:p>
          </table:table-cell>
          <table:table-cell office:value-type="string">
            <text:p>(03)5478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鹿港澄悅酒店</text:p>
          </table:table-cell>
          <table:table-cell office:value-type="string">
            <text:p>彰化縣</text:p>
          </table:table-cell>
          <table:table-cell office:value-type="string">
            <text:p>彰化縣鹿港鎮中正路598號1樓、5至8樓</text:p>
          </table:table-cell>
          <table:table-cell office:value-type="string">
            <text:p>(04)778572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傑仕堡有氧酒店</text:p>
          </table:table-cell>
          <table:table-cell office:value-type="string">
            <text:p>新北市</text:p>
          </table:table-cell>
          <table:table-cell office:value-type="string">
            <text:p>新北市板橋區縣民大道2段275號、275號2至17樓、277號2樓</text:p>
          </table:table-cell>
          <table:table-cell office:value-type="string">
            <text:p>(02)77273000#5408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旋酒店</text:p>
          </table:table-cell>
          <table:table-cell office:value-type="string">
            <text:p>臺北市</text:p>
          </table:table-cell>
          <table:table-cell office:value-type="string">
            <text:p>臺北市內湖區江南街55號3樓至9樓</text:p>
          </table:table-cell>
          <table:table-cell office:value-type="string">
            <text:p>(02)87527888#62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達大飯店<text:s/></text:p>
          </table:table-cell>
          <table:table-cell office:value-type="string">
            <text:p>臺北市</text:p>
          </table:table-cell>
          <table:table-cell office:value-type="string">
            <text:p>臺北市萬華區艋舺大道167號1-26樓</text:p>
          </table:table-cell>
          <table:table-cell office:value-type="string">
            <text:p>(02)23836789#632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撒大飯店</text:p>
          </table:table-cell>
          <table:table-cell office:value-type="string">
            <text:p>屏東縣</text:p>
          </table:table-cell>
          <table:table-cell office:value-type="string">
            <text:p>屏東縣恆春鎮墾丁路6號</text:p>
          </table:table-cell>
          <table:table-cell office:value-type="string">
            <text:p>(08)8861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勝利127民宿</text:p>
          </table:table-cell>
          <table:table-cell office:value-type="string">
            <text:p>屏東縣</text:p>
          </table:table-cell>
          <table:table-cell office:value-type="string">
            <text:p>屏東縣屏東市勝利路127號</text:p>
          </table:table-cell>
          <table:table-cell office:value-type="string">
            <text:p>(08)7320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勝利131民宿</text:p>
          </table:table-cell>
          <table:table-cell office:value-type="string">
            <text:p>屏東縣</text:p>
          </table:table-cell>
          <table:table-cell office:value-type="string">
            <text:p>屏東縣屏東市勝利路131號</text:p>
          </table:table-cell>
          <table:table-cell office:value-type="string">
            <text:p>(08)7320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寒居酒店</text:p>
          </table:table-cell>
          <table:table-cell office:value-type="string">
            <text:p>臺北市</text:p>
          </table:table-cell>
          <table:table-cell office:value-type="string">
            <text:p>臺北市中山區松江路116號1樓至9樓</text:p>
          </table:table-cell>
          <table:table-cell office:value-type="string">
            <text:p>(02)66008000#888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寒軒國際大飯店</text:p>
          </table:table-cell>
          <table:table-cell office:value-type="string">
            <text:p>高雄市</text:p>
          </table:table-cell>
          <table:table-cell office:value-type="string">
            <text:p>高雄市苓雅區四維三路三十三號</text:p>
          </table:table-cell>
          <table:table-cell office:value-type="string">
            <text:p>(0980)5562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富光大旅社</text:p>
          </table:table-cell>
          <table:table-cell office:value-type="string">
            <text:p>屏東縣</text:p>
          </table:table-cell>
          <table:table-cell office:value-type="string">
            <text:p>屏東縣屏東市公園路19-7號</text:p>
          </table:table-cell>
          <table:table-cell office:value-type="string">
            <text:p>(08)734565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富信大飯店</text:p>
          </table:table-cell>
          <table:table-cell office:value-type="string">
            <text:p>新北市</text:p>
          </table:table-cell>
          <table:table-cell office:value-type="string">
            <text:p>新北市汐止區大同路一段152號</text:p>
          </table:table-cell>
          <table:table-cell office:value-type="string">
            <text:p>(02)26416422#511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尊爵大飯店</text:p>
          </table:table-cell>
          <table:table-cell office:value-type="string">
            <text:p>桃園市</text:p>
          </table:table-cell>
          <table:table-cell office:value-type="string">
            <text:p>桃園市桃園區莊敬路一段300號</text:p>
          </table:table-cell>
          <table:table-cell office:value-type="string">
            <text:p>(03)3169090#85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尊爵天際大飯店</text:p>
          </table:table-cell>
          <table:table-cell office:value-type="string">
            <text:p>桃園市</text:p>
          </table:table-cell>
          <table:table-cell office:value-type="string">
            <text:p>桃園市蘆竹區南崁路一段108號</text:p>
          </table:table-cell>
          <table:table-cell office:value-type="string">
            <text:p>(03)2228100#608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惠來谷關溫泉會館</text:p>
          </table:table-cell>
          <table:table-cell office:value-type="string">
            <text:p>臺中市</text:p>
          </table:table-cell>
          <table:table-cell office:value-type="string">
            <text:p>臺中市和平區東關路一段溫泉巷十號</text:p>
          </table:table-cell>
          <table:table-cell office:value-type="string">
            <text:p>(04)25951998#62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提米好旅</text:p>
          </table:table-cell>
          <table:table-cell office:value-type="string">
            <text:p>彰化縣</text:p>
          </table:table-cell>
          <table:table-cell office:value-type="string">
            <text:p>彰化縣彰化市成功路277號</text:p>
          </table:table-cell>
          <table:table-cell office:value-type="string">
            <text:p>(04)7061086#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揚昊民宿</text:p>
          </table:table-cell>
          <table:table-cell office:value-type="string">
            <text:p>苗栗縣</text:p>
          </table:table-cell>
          <table:table-cell office:value-type="string">
            <text:p>苗栗縣苑裡鎮蕉埔里8鄰蕉埔86之6號</text:p>
          </table:table-cell>
          <table:table-cell office:value-type="string">
            <text:p>(037)747711#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晶泉丰旅</text:p>
          </table:table-cell>
          <table:table-cell office:value-type="string">
            <text:p>宜蘭縣</text:p>
          </table:table-cell>
          <table:table-cell office:value-type="string">
            <text:p>宜蘭縣礁溪鄉溫泉路67號2至10樓</text:p>
          </table:table-cell>
          <table:table-cell office:value-type="string">
            <text:p>(03)9100000#610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智醫康寓</text:p>
          </table:table-cell>
          <table:table-cell office:value-type="string">
            <text:p>桃園市</text:p>
          </table:table-cell>
          <table:table-cell office:value-type="string">
            <text:p>桃園市桃園區民生路107號1-3樓及7-20樓</text:p>
          </table:table-cell>
          <table:table-cell office:value-type="string">
            <text:p>(03)336257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渴望會館</text:p>
          </table:table-cell>
          <table:table-cell office:value-type="string">
            <text:p>桃園市</text:p>
          </table:table-cell>
          <table:table-cell office:value-type="string">
            <text:p>桃園市龍潭區渴望路428號3-5樓</text:p>
          </table:table-cell>
          <table:table-cell office:value-type="string">
            <text:p>(03)4072999#711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然一酒店</text:p>
          </table:table-cell>
          <table:table-cell office:value-type="string">
            <text:p>高雄市</text:p>
          </table:table-cell>
          <table:table-cell office:value-type="string">
            <text:p>高雄市前鎮區中山二路199號</text:p>
          </table:table-cell>
          <table:table-cell office:value-type="string">
            <text:p>(07)9730186#166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發現號特色民宿</text:p>
          </table:table-cell>
          <table:table-cell office:value-type="string">
            <text:p>屏東縣</text:p>
          </table:table-cell>
          <table:table-cell office:value-type="string">
            <text:p>屏東縣林邊鄉崎峰村裕後路90號</text:p>
          </table:table-cell>
          <table:table-cell office:value-type="string">
            <text:p>(08)87503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華泰瑞苑</text:p>
          </table:table-cell>
          <table:table-cell office:value-type="string">
            <text:p>屏東縣</text:p>
          </table:table-cell>
          <table:table-cell office:value-type="string">
            <text:p>屏東縣恆春鎮公園路101號</text:p>
          </table:table-cell>
          <table:table-cell office:value-type="string">
            <text:p>(08)886366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陽明山天籟渡假酒店</text:p>
          </table:table-cell>
          <table:table-cell office:value-type="string">
            <text:p>新北市</text:p>
          </table:table-cell>
          <table:table-cell office:value-type="string">
            <text:p>新北市金山區名流路1之6號、1之7號、1之9號、1之9號5樓及1之9號5樓之1至之8</text:p>
          </table:table-cell>
          <table:table-cell office:value-type="string">
            <text:p>(02)24080400#17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雅霖大飯店</text:p>
          </table:table-cell>
          <table:table-cell office:value-type="string">
            <text:p>澎湖縣</text:p>
          </table:table-cell>
          <table:table-cell office:value-type="string">
            <text:p>澎湖縣馬公市同和路100號</text:p>
          </table:table-cell>
          <table:table-cell office:value-type="string">
            <text:p>(06)92613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雲品溫泉酒店日月潭</text:p>
          </table:table-cell>
          <table:table-cell office:value-type="string">
            <text:p>南投縣</text:p>
          </table:table-cell>
          <table:table-cell office:value-type="string">
            <text:p>南投縣魚池鄉水社村中正路23號</text:p>
          </table:table-cell>
          <table:table-cell office:value-type="string">
            <text:p>(049)221295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雲頂國際商旅</text:p>
          </table:table-cell>
          <table:table-cell office:value-type="string">
            <text:p>臺南市</text:p>
          </table:table-cell>
          <table:table-cell office:value-type="string">
            <text:p>臺南市南區大同路二段530號</text:p>
          </table:table-cell>
          <table:table-cell office:value-type="string">
            <text:p>(06)26877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圓山大飯店</text:p>
          </table:table-cell>
          <table:table-cell office:value-type="string">
            <text:p>臺北市</text:p>
          </table:table-cell>
          <table:table-cell office:value-type="string">
            <text:p>臺北市中山區中山北路4段1巷1號</text:p>
          </table:table-cell>
          <table:table-cell office:value-type="string">
            <text:p>(02)28861818#100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奧斯卡去旅行民宿</text:p>
          </table:table-cell>
          <table:table-cell office:value-type="string">
            <text:p>臺東縣</text:p>
          </table:table-cell>
          <table:table-cell office:value-type="string">
            <text:p>臺東縣臺東市興安路一段167號</text:p>
          </table:table-cell>
          <table:table-cell office:value-type="string">
            <text:p>(0910)63394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奧斯卡民宿</text:p>
          </table:table-cell>
          <table:table-cell office:value-type="string">
            <text:p>臺東縣</text:p>
          </table:table-cell>
          <table:table-cell office:value-type="string">
            <text:p>臺東縣台東市興安路1段175號</text:p>
          </table:table-cell>
          <table:table-cell office:value-type="string">
            <text:p>(0965)329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安捷國際酒店</text:p>
          </table:table-cell>
          <table:table-cell office:value-type="string">
            <text:p>新竹縣</text:p>
          </table:table-cell>
          <table:table-cell office:value-type="string">
            <text:p>新竹縣竹北市復興三路二段168號14樓-18樓</text:p>
          </table:table-cell>
          <table:table-cell office:value-type="string">
            <text:p>(03)6209777#66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老爺大酒店</text:p>
          </table:table-cell>
          <table:table-cell office:value-type="string">
            <text:p>新竹市</text:p>
          </table:table-cell>
          <table:table-cell office:value-type="string">
            <text:p>新竹市東區光復路一段227號</text:p>
          </table:table-cell>
          <table:table-cell office:value-type="string">
            <text:p>(03)5631285#20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喜來登大飯店</text:p>
          </table:table-cell>
          <table:table-cell office:value-type="string">
            <text:p>新竹縣</text:p>
          </table:table-cell>
          <table:table-cell office:value-type="string">
            <text:p>新竹縣竹北市光明六路東一段265號</text:p>
          </table:table-cell>
          <table:table-cell office:value-type="string">
            <text:p>(03)620612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福華大飯店</text:p>
          </table:table-cell>
          <table:table-cell office:value-type="string">
            <text:p>新竹市</text:p>
          </table:table-cell>
          <table:table-cell office:value-type="string">
            <text:p>新竹市中正路178號</text:p>
          </table:table-cell>
          <table:table-cell office:value-type="string">
            <text:p>(03)5282323#5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南一二文創商行</text:p>
          </table:table-cell>
          <table:table-cell office:value-type="string">
            <text:p>桃園市</text:p>
          </table:table-cell>
          <table:table-cell office:value-type="string">
            <text:p>桃園市大溪區中山路１２號</text:p>
          </table:table-cell>
          <table:table-cell office:value-type="string">
            <text:p>(03)38844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悦花園酒店</text:p>
          </table:table-cell>
          <table:table-cell office:value-type="string">
            <text:p>嘉義市</text:p>
          </table:table-cell>
          <table:table-cell office:value-type="string">
            <text:p>嘉義市東區後湖里6鄰保順路69號</text:p>
          </table:table-cell>
          <table:table-cell office:value-type="string">
            <text:p>(05)2777266#58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溪頭福華渡假飯店-溪頭漢光樓<text:s/></text:p>
          </table:table-cell>
          <table:table-cell office:value-type="string">
            <text:p>南投縣</text:p>
          </table:table-cell>
          <table:table-cell office:value-type="string">
            <text:p>南投縣鹿谷鄉森林巷11、12號</text:p>
          </table:table-cell>
          <table:table-cell office:value-type="string">
            <text:p>(049)2612588#30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太魯閣山闊館</text:p>
          </table:table-cell>
          <table:table-cell office:value-type="string">
            <text:p>花蓮縣</text:p>
          </table:table-cell>
          <table:table-cell office:value-type="string">
            <text:p>花蓮縣新城鄉順安村草林10-7號</text:p>
          </table:table-cell>
          <table:table-cell office:value-type="string">
            <text:p>(03)8612000#147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太魯閣沁海館</text:p>
          </table:table-cell>
          <table:table-cell office:value-type="string">
            <text:p>花蓮縣</text:p>
          </table:table-cell>
          <table:table-cell office:value-type="string">
            <text:p>花蓮縣新城鄉順安村6鄰草林10之6號</text:p>
          </table:table-cell>
          <table:table-cell office:value-type="string">
            <text:p>(03)8228835#1174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館</text:p>
          </table:table-cell>
          <table:table-cell office:value-type="string">
            <text:p>花蓮縣</text:p>
          </table:table-cell>
          <table:table-cell office:value-type="string">
            <text:p>花蓮縣花蓮市民立里1鄰中美路142號</text:p>
          </table:table-cell>
          <table:table-cell office:value-type="string">
            <text:p>(03)8228835#1174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花時間 宜蘭傳藝</text:p>
          </table:table-cell>
          <table:table-cell office:value-type="string">
            <text:p>宜蘭縣</text:p>
          </table:table-cell>
          <table:table-cell office:value-type="string">
            <text:p>宜蘭縣五結鄉五濱路二段201號</text:p>
          </table:table-cell>
          <table:table-cell office:value-type="string">
            <text:p>(03)9256899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花時間 花蓮</text:p>
          </table:table-cell>
          <table:table-cell office:value-type="string">
            <text:p>花蓮縣</text:p>
          </table:table-cell>
          <table:table-cell office:value-type="string">
            <text:p>花蓮縣新城鄉順安村草林10-5號2~6樓</text:p>
          </table:table-cell>
          <table:table-cell office:value-type="string">
            <text:p>(03)8612000#147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瑞穗天合國際觀光酒店</text:p>
          </table:table-cell>
          <table:table-cell office:value-type="string">
            <text:p>花蓮縣</text:p>
          </table:table-cell>
          <table:table-cell office:value-type="string">
            <text:p>花蓮縣瑞穗鄉溫泉路二段368號</text:p>
          </table:table-cell>
          <table:table-cell office:value-type="string">
            <text:p>(03)8876000#326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裕元花園酒店</text:p>
          </table:table-cell>
          <table:table-cell office:value-type="string">
            <text:p>臺中市</text:p>
          </table:table-cell>
          <table:table-cell office:value-type="string">
            <text:p>臺中市西屯區臺灣大道四段610號</text:p>
          </table:table-cell>
          <table:table-cell office:value-type="string">
            <text:p>(04)24655660#503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遇見民宿</text:p>
          </table:table-cell>
          <table:table-cell office:value-type="string">
            <text:p>屏東縣</text:p>
          </table:table-cell>
          <table:table-cell office:value-type="string">
            <text:p>屏東縣東港鎮水源路221號(新和段737-4地號)</text:p>
          </table:table-cell>
          <table:table-cell office:value-type="string">
            <text:p>(08)83333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頌華私墅肆區民宿</text:p>
          </table:table-cell>
          <table:table-cell office:value-type="string">
            <text:p>澎湖縣</text:p>
          </table:table-cell>
          <table:table-cell office:value-type="string">
            <text:p>澎湖縣湖西鄉許家村6鄰港子尾120之5號</text:p>
          </table:table-cell>
          <table:table-cell office:value-type="string">
            <text:p>(06)921295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仕特飯店</text:p>
          </table:table-cell>
          <table:table-cell office:value-type="string">
            <text:p>桃園市</text:p>
          </table:table-cell>
          <table:table-cell office:value-type="string">
            <text:p>桃園市桃園區中山路203號</text:p>
          </table:table-cell>
          <table:table-cell office:value-type="string">
            <text:p>(03)33439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富野渡假酒店</text:p>
          </table:table-cell>
          <table:table-cell office:value-type="string">
            <text:p>嘉義縣</text:p>
          </table:table-cell>
          <table:table-cell office:value-type="string">
            <text:p>嘉義縣民雄鄉三興村升學一街3、5、7、9、11、13、15、17、19、21、23、25、27號</text:p>
          </table:table-cell>
          <table:table-cell office:value-type="string">
            <text:p>(05)27216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智選假日酒店</text:p>
          </table:table-cell>
          <table:table-cell office:value-type="string">
            <text:p>嘉義市</text:p>
          </table:table-cell>
          <table:table-cell office:value-type="string">
            <text:p>嘉義市西區中興路69號B2至13層樓</text:p>
          </table:table-cell>
          <table:table-cell office:value-type="string">
            <text:p>(05)2335899#8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夢想森林親子民宿</text:p>
          </table:table-cell>
          <table:table-cell office:value-type="string">
            <text:p>宜蘭縣</text:p>
          </table:table-cell>
          <table:table-cell office:value-type="string">
            <text:p>宜蘭縣三星鄉三星鄉大德路二段613號</text:p>
          </table:table-cell>
          <table:table-cell office:value-type="string">
            <text:p>(03)98981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榮美金鬱金香酒店</text:p>
          </table:table-cell>
          <table:table-cell office:value-type="string">
            <text:p>臺南市</text:p>
          </table:table-cell>
          <table:table-cell office:value-type="string">
            <text:p>臺南市北區海安路三段50號</text:p>
          </table:table-cell>
          <table:table-cell office:value-type="string">
            <text:p>(06)2200800#60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榮興金鬱金香酒店</text:p>
          </table:table-cell>
          <table:table-cell office:value-type="string">
            <text:p>臺南市</text:p>
          </table:table-cell>
          <table:table-cell office:value-type="string">
            <text:p>臺南市中西區民族路二段128號</text:p>
          </table:table-cell>
          <table:table-cell office:value-type="string">
            <text:p>(06)2200800#600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美民宿</text:p>
          </table:table-cell>
          <table:table-cell office:value-type="string">
            <text:p>臺東縣</text:p>
          </table:table-cell>
          <table:table-cell office:value-type="string">
            <text:p>臺東縣台東市精誠路241號</text:p>
          </table:table-cell>
          <table:table-cell office:value-type="string">
            <text:p>(089)3284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台北二館</text:p>
          </table:table-cell>
          <table:table-cell office:value-type="string">
            <text:p>新北市</text:p>
          </table:table-cell>
          <table:table-cell office:value-type="string">
            <text:p>新北市深坑區北深路三段236號</text:p>
          </table:table-cell>
          <table:table-cell office:value-type="string">
            <text:p>(02)26620088#18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桃園</text:p>
          </table:table-cell>
          <table:table-cell office:value-type="string">
            <text:p>桃園市</text:p>
          </table:table-cell>
          <table:table-cell office:value-type="string">
            <text:p>桃園市桃園區同安里大興西路一段200號</text:p>
          </table:table-cell>
          <table:table-cell office:value-type="string">
            <text:p>(03)3265800#3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桃園機場捷運 A8<text:s/></text:p>
          </table:table-cell>
          <table:table-cell office:value-type="string">
            <text:p>桃園市</text:p>
          </table:table-cell>
          <table:table-cell office:value-type="string">
            <text:p>桃園市龜山區復興一路2號3樓</text:p>
          </table:table-cell>
          <table:table-cell office:value-type="string">
            <text:p>(03)3285688#87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高雄</text:p>
          </table:table-cell>
          <table:table-cell office:value-type="string">
            <text:p>高雄市</text:p>
          </table:table-cell>
          <table:table-cell office:value-type="string">
            <text:p>高雄市鹽埕區五福四路45號</text:p>
          </table:table-cell>
          <table:table-cell office:value-type="string">
            <text:p>(07)5317777#778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淡水漁人碼頭</text:p>
          </table:table-cell>
          <table:table-cell office:value-type="string">
            <text:p>新北市</text:p>
          </table:table-cell>
          <table:table-cell office:value-type="string">
            <text:p>新北市淡水區觀海路83號</text:p>
          </table:table-cell>
          <table:table-cell office:value-type="string">
            <text:p>(02)2805 9958#81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　福隆<text:s/></text:p>
          </table:table-cell>
          <table:table-cell office:value-type="string">
            <text:p>新北市</text:p>
          </table:table-cell>
          <table:table-cell office:value-type="string">
            <text:p>新北市貢寮區福隆里福隆街41號</text:p>
          </table:table-cell>
          <table:table-cell office:value-type="string">
            <text:p>(02)2499238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墾丁</text:p>
          </table:table-cell>
          <table:table-cell office:value-type="string">
            <text:p>屏東縣</text:p>
          </table:table-cell>
          <table:table-cell office:value-type="string">
            <text:p>屏東縣恆春鎮船帆路1000號</text:p>
          </table:table-cell>
          <table:table-cell office:value-type="string">
            <text:p>(08)8856969#34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麗寶樂園</text:p>
          </table:table-cell>
          <table:table-cell office:value-type="string">
            <text:p>臺中市</text:p>
          </table:table-cell>
          <table:table-cell office:value-type="string">
            <text:p>臺中市后里區福容路88號</text:p>
          </table:table-cell>
          <table:table-cell office:value-type="string">
            <text:p>(04)25571366#834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花蓮</text:p>
          </table:table-cell>
          <table:table-cell office:value-type="string">
            <text:p>花蓮縣</text:p>
          </table:table-cell>
          <table:table-cell office:value-type="string">
            <text:p>花蓮縣花蓮市民生路51號</text:p>
          </table:table-cell>
          <table:table-cell office:value-type="string">
            <text:p>(03)8239988#750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林口</text:p>
          </table:table-cell>
          <table:table-cell office:value-type="string">
            <text:p>桃園市</text:p>
          </table:table-cell>
          <table:table-cell office:value-type="string">
            <text:p>桃園市龜山區文二一街68號</text:p>
          </table:table-cell>
          <table:table-cell office:value-type="string">
            <text:p>(03)3277388#3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高雄</text:p>
          </table:table-cell>
          <table:table-cell office:value-type="string">
            <text:p>高雄市</text:p>
          </table:table-cell>
          <table:table-cell office:value-type="string">
            <text:p>高雄市前金區永恆街3號6-14樓</text:p>
          </table:table-cell>
          <table:table-cell office:value-type="string">
            <text:p>(07)2156688#630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大飯店</text:p>
          </table:table-cell>
          <table:table-cell office:value-type="string">
            <text:p>臺北市</text:p>
          </table:table-cell>
          <table:table-cell office:value-type="string">
            <text:p>臺北市大安區仁愛路三段160號</text:p>
          </table:table-cell>
          <table:table-cell office:value-type="string">
            <text:p>(02)27002323#24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石門水庫渡假飯店</text:p>
          </table:table-cell>
          <table:table-cell office:value-type="string">
            <text:p>桃園市</text:p>
          </table:table-cell>
          <table:table-cell office:value-type="string">
            <text:p>桃園市龍潭區民富街176號</text:p>
          </table:table-cell>
          <table:table-cell office:value-type="string">
            <text:p>(03)4714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國際文教會館</text:p>
          </table:table-cell>
          <table:table-cell office:value-type="string">
            <text:p>臺北市</text:p>
          </table:table-cell>
          <table:table-cell office:value-type="string">
            <text:p>臺北市大安區新生南路3段30號(住宿棟1樓及5樓至14樓)</text:p>
          </table:table-cell>
          <table:table-cell office:value-type="string">
            <text:p>(02)77122323#234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爾摩沙遊艇酒店</text:p>
          </table:table-cell>
          <table:table-cell office:value-type="string">
            <text:p>臺南市</text:p>
          </table:table-cell>
          <table:table-cell office:value-type="string">
            <text:p>臺南市安平區王城里13鄰安平路988號1至10樓</text:p>
          </table:table-cell>
          <table:table-cell office:value-type="string">
            <text:p>(06)39113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綠意山莊民宿</text:p>
          </table:table-cell>
          <table:table-cell office:value-type="string">
            <text:p>苗栗縣</text:p>
          </table:table-cell>
          <table:table-cell office:value-type="string">
            <text:p>苗栗縣苑裡鎮蕉埔里8鄰蕉埔86之5號</text:p>
          </table:table-cell>
          <table:table-cell office:value-type="string">
            <text:p>(037)747711#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綠藤輕旅</text:p>
          </table:table-cell>
          <table:table-cell office:value-type="string">
            <text:p>桃園市</text:p>
          </table:table-cell>
          <table:table-cell office:value-type="string">
            <text:p>桃園市大園區中山南路二段673號</text:p>
          </table:table-cell>
          <table:table-cell office:value-type="string">
            <text:p>(03)287304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維悅酒店</text:p>
          </table:table-cell>
          <table:table-cell office:value-type="string">
            <text:p>臺南市</text:p>
          </table:table-cell>
          <table:table-cell office:value-type="string">
            <text:p>臺南市安平區慶平路539號 1至5樓及地下1樓</text:p>
          </table:table-cell>
          <table:table-cell office:value-type="string">
            <text:p>(06)2950888#112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臺中逢甲智選假日酒店</text:p>
          </table:table-cell>
          <table:table-cell office:value-type="string">
            <text:p>臺中市</text:p>
          </table:table-cell>
          <table:table-cell office:value-type="string">
            <text:p>臺中市西屯區福星北三街33巷28號</text:p>
          </table:table-cell>
          <table:table-cell office:value-type="string">
            <text:p>(04)27083911#61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臺邦商旅</text:p>
          </table:table-cell>
          <table:table-cell office:value-type="string">
            <text:p>臺南市</text:p>
          </table:table-cell>
          <table:table-cell office:value-type="string">
            <text:p>臺南市安平區永華二街199號</text:p>
          </table:table-cell>
          <table:table-cell office:value-type="string">
            <text:p>(06)2931800#86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遠雄悅來大飯店</text:p>
          </table:table-cell>
          <table:table-cell office:value-type="string">
            <text:p>花蓮縣</text:p>
          </table:table-cell>
          <table:table-cell office:value-type="string">
            <text:p>花蓮縣壽豐鄉鹽寮村山嶺18號</text:p>
          </table:table-cell>
          <table:table-cell office:value-type="string">
            <text:p>(03)8123900#82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鳳山79 背包客</text:p>
          </table:table-cell>
          <table:table-cell office:value-type="string">
            <text:p>高雄市</text:p>
          </table:table-cell>
          <table:table-cell office:value-type="string">
            <text:p>高雄市鳳山區黃埔新村東一巷79號</text:p>
          </table:table-cell>
          <table:table-cell office:value-type="string">
            <text:p>(07)55245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劍湖山渡假大飯店</text:p>
          </table:table-cell>
          <table:table-cell office:value-type="string">
            <text:p>雲林縣</text:p>
          </table:table-cell>
          <table:table-cell office:value-type="string">
            <text:p>雲林縣古坑鄉永光村大湖口67-8號</text:p>
          </table:table-cell>
          <table:table-cell office:value-type="string">
            <text:p>(05)5829900#721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澎湖福朋喜來登酒店</text:p>
          </table:table-cell>
          <table:table-cell office:value-type="string">
            <text:p>澎湖縣</text:p>
          </table:table-cell>
          <table:table-cell office:value-type="string">
            <text:p>澎湖縣馬公市新店路197號</text:p>
          </table:table-cell>
          <table:table-cell office:value-type="string">
            <text:p>(06)9279955#3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澎澄飯店</text:p>
          </table:table-cell>
          <table:table-cell office:value-type="string">
            <text:p>澎湖縣</text:p>
          </table:table-cell>
          <table:table-cell office:value-type="string">
            <text:p>澎湖縣馬公市同和路168號</text:p>
          </table:table-cell>
          <table:table-cell office:value-type="string">
            <text:p>0692356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緻麗伯爵酒店</text:p>
          </table:table-cell>
          <table:table-cell office:value-type="string">
            <text:p>雲林縣</text:p>
          </table:table-cell>
          <table:table-cell office:value-type="string">
            <text:p>雲林縣斗六市中山路6號</text:p>
          </table:table-cell>
          <table:table-cell office:value-type="string">
            <text:p>(05)5341666#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緣羊軒民宿</text:p>
          </table:table-cell>
          <table:table-cell office:value-type="string">
            <text:p>臺東縣</text:p>
          </table:table-cell>
          <table:table-cell office:value-type="string">
            <text:p>臺東縣台東市南一街96號</text:p>
          </table:table-cell>
          <table:table-cell office:value-type="string">
            <text:p>0893264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趣淘漫旅-台北</text:p>
          </table:table-cell>
          <table:table-cell office:value-type="string">
            <text:p>新北市</text:p>
          </table:table-cell>
          <table:table-cell office:value-type="string">
            <text:p>新北市板橋區中山路1段139號(1至2層)、139號4樓至20樓</text:p>
          </table:table-cell>
          <table:table-cell office:value-type="string">
            <text:p>(02)29583000#7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趣淘漫旅-台東</text:p>
          </table:table-cell>
          <table:table-cell office:value-type="string">
            <text:p>臺東縣</text:p>
          </table:table-cell>
          <table:table-cell office:value-type="string">
            <text:p>臺東縣台東市新站路260號</text:p>
          </table:table-cell>
          <table:table-cell office:value-type="string">
            <text:p>(089)231188#718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墾丁夏都沙灘酒店</text:p>
          </table:table-cell>
          <table:table-cell office:value-type="string">
            <text:p>屏東縣</text:p>
          </table:table-cell>
          <table:table-cell office:value-type="string">
            <text:p>屏東縣恆春鎮墾丁路451號</text:p>
          </table:table-cell>
          <table:table-cell office:value-type="string">
            <text:p>(0910)37182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墾丁福華渡假飯店</text:p>
          </table:table-cell>
          <table:table-cell office:value-type="string">
            <text:p>屏東縣</text:p>
          </table:table-cell>
          <table:table-cell office:value-type="string">
            <text:p>屏東縣恆春鎮墾丁里墾丁路2號</text:p>
          </table:table-cell>
          <table:table-cell office:value-type="string">
            <text:p>(08)8862324#27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橘子民宿</text:p>
          </table:table-cell>
          <table:table-cell office:value-type="string">
            <text:p>苗栗縣</text:p>
          </table:table-cell>
          <table:table-cell office:value-type="string">
            <text:p>苗栗縣竹南鎮竹南里7鄰民治街12號</text:p>
          </table:table-cell>
          <table:table-cell office:value-type="string">
            <text:p>(0972)09265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翰品酒店 高雄</text:p>
          </table:table-cell>
          <table:table-cell office:value-type="string">
            <text:p>高雄市</text:p>
          </table:table-cell>
          <table:table-cell office:value-type="string">
            <text:p>高雄市鹽埕區大仁路43號</text:p>
          </table:table-cell>
          <table:table-cell office:value-type="string">
            <text:p>(07)5614688#311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礁溪老爺酒店</text:p>
          </table:table-cell>
          <table:table-cell office:value-type="string">
            <text:p>宜蘭縣</text:p>
          </table:table-cell>
          <table:table-cell office:value-type="string">
            <text:p>宜蘭縣礁溪鄉大忠村五峰路69號、69-1號</text:p>
          </table:table-cell>
          <table:table-cell office:value-type="string">
            <text:p>(03)9885211#800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礁溪寒沐酒店</text:p>
          </table:table-cell>
          <table:table-cell office:value-type="string">
            <text:p>宜蘭縣</text:p>
          </table:table-cell>
          <table:table-cell office:value-type="string">
            <text:p>宜蘭縣礁溪鄉健康路1號1至14樓</text:p>
          </table:table-cell>
          <table:table-cell office:value-type="string">
            <text:p>(03)905800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薆悅酒店野柳渡假館一館</text:p>
          </table:table-cell>
          <table:table-cell office:value-type="string">
            <text:p>新北市</text:p>
          </table:table-cell>
          <table:table-cell office:value-type="string">
            <text:p>新北市萬里區野柳里港東路162號之2</text:p>
          </table:table-cell>
          <table:table-cell office:value-type="string">
            <text:p>(02)77035770#62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藍水輕旅</text:p>
          </table:table-cell>
          <table:table-cell office:value-type="string">
            <text:p>桃園市</text:p>
          </table:table-cell>
          <table:table-cell office:value-type="string">
            <text:p>桃園市大園區高鐵南路一段126號</text:p>
          </table:table-cell>
          <table:table-cell office:value-type="string">
            <text:p>(03)28718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關子嶺富野溫泉會館</text:p>
          </table:table-cell>
          <table:table-cell office:value-type="string">
            <text:p>臺南市</text:p>
          </table:table-cell>
          <table:table-cell office:value-type="string">
            <text:p>臺南市白河區關子嶺28號</text:p>
          </table:table-cell>
          <table:table-cell office:value-type="string">
            <text:p>(06)68222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格休閒飯店</text:p>
          </table:table-cell>
          <table:table-cell office:value-type="string">
            <text:p>花蓮縣</text:p>
          </table:table-cell>
          <table:table-cell office:value-type="string">
            <text:p>花蓮縣花蓮市商校街258.260.262號</text:p>
          </table:table-cell>
          <table:table-cell office:value-type="string">
            <text:p>(03)834992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軒國際飯店</text:p>
          </table:table-cell>
          <table:table-cell office:value-type="string">
            <text:p>花蓮縣</text:p>
          </table:table-cell>
          <table:table-cell office:value-type="string">
            <text:p>花蓮縣花蓮市中美路99之1號</text:p>
          </table:table-cell>
          <table:table-cell office:value-type="string">
            <text:p>(03)824689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翔大飯店</text:p>
          </table:table-cell>
          <table:table-cell office:value-type="string">
            <text:p>花蓮縣</text:p>
          </table:table-cell>
          <table:table-cell office:value-type="string">
            <text:p>花蓮縣花蓮市花崗街2、4、6、8、10號</text:p>
          </table:table-cell>
          <table:table-cell office:value-type="string">
            <text:p>(03)832373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讀好民宿<text:s/></text:p>
          </table:table-cell>
          <table:table-cell office:value-type="string">
            <text:p>宜蘭縣</text:p>
          </table:table-cell>
          <table:table-cell office:value-type="string">
            <text:p>宜蘭縣五結鄉五結中路二段241巷7弄16號</text:p>
          </table:table-cell>
          <table:table-cell office:value-type="string">
            <text:p>(0920)02313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觀霧山莊</text:p>
          </table:table-cell>
          <table:table-cell office:value-type="string">
            <text:p>苗栗縣</text:p>
          </table:table-cell>
          <table:table-cell office:value-type="string">
            <text:p>苗栗縣泰安鄉梅園村觀霧8號</text:p>
          </table:table-cell>
          <table:table-cell office:value-type="string">
            <text:p>(03)334381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綉溪安平</text:p>
          </table:table-cell>
          <table:table-cell office:value-type="string">
            <text:p>臺南市</text:p>
          </table:table-cell>
          <table:table-cell office:value-type="string">
            <text:p>臺南市安平區王城里12鄰古堡街136號、138號、138之1號</text:p>
          </table:table-cell>
          <table:table-cell office:value-type="string">
            <text:p>(06)3910988#31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鐡馬騎跡</text:p>
          </table:table-cell>
          <table:table-cell office:value-type="string">
            <text:p>屏東縣</text:p>
          </table:table-cell>
          <table:table-cell office:value-type="string">
            <text:p>屏東縣東港鎮新學路50號</text:p>
          </table:table-cell>
          <table:table-cell office:value-type="string">
            <text:p>(0952)848898</text:p>
          </table:table-cell>
          <table:table-cell office:value-type="string">
            <text:p>銅級環保旅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