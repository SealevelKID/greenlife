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都麗緻大飯店</text:p>
          </table:table-cell>
          <table:table-cell office:value-type="string">
            <text:p>臺北市</text:p>
          </table:table-cell>
          <table:table-cell office:value-type="string">
            <text:p>臺北市中山區民權東路2段41號</text:p>
          </table:table-cell>
          <table:table-cell office:value-type="string">
            <text:p>02773523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億酒店股份有限公司</text:p>
          </table:table-cell>
          <table:table-cell office:value-type="string">
            <text:p>高雄市</text:p>
          </table:table-cell>
          <table:table-cell office:value-type="string">
            <text:p>高雄市前鎮區林森四路189號</text:p>
          </table:table-cell>
          <table:table-cell office:value-type="string">
            <text:p>07333399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